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oglio1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mancano</text:p>
          </table:table-cell>
          <table:table-cell office:value-type="string" calcext:value-type="string">
            <text:p>Pezzo 1</text:p>
          </table:table-cell>
          <table:table-cell office:value-type="string" calcext:value-type="string">
            <text:p>Pezzo 2</text:p>
          </table:table-cell>
          <table:table-cell office:value-type="string" calcext:value-type="string">
            <text:p>Pezzo 3</text:p>
          </table:table-cell>
          <table:table-cell office:value-type="string" calcext:value-type="string">
            <text:p>manca</text:p>
          </table:table-cell>
        </table:table-row>
        <table:table-row table:style-name="ro1">
          <table:table-cell office:value-type="string" calcext:value-type="string">
            <text:p>1 thrus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2]-[.C2]-[.D2]-[.E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crush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B3]-[.C3]-[.D3]-[.E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slas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4]-[.C4]-[.D4]-[.E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8 heat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formula="of:=[.B5]-[.C5]-[.D5]-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col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B6]-[.C6]-[.D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matte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7]-[.C7]-[.D7]-[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spirit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-[.C8]-[.D8]-[.E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0 hit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B9]-[.C9]-[.D9]-[.E9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7 energ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10]-[.C10]-[.D10]-[.E1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13:35:40.537570500</meta:creation-date>
    <dc:date>2026-06-16T13:50:13.186974100</dc:date>
    <meta:editing-duration>PT14M33S</meta:editing-duration>
    <meta:editing-cycles>2</meta:editing-cycles>
    <meta:generator>LibreOffice/26.2.1.2$Windows_X86_64 LibreOffice_project/620$Build-2</meta:generator>
    <meta:document-statistic meta:table-count="1" meta:cell-count="46" meta:object-count="0"/>
  </office:meta>
</office:document-meta>
</file>